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ata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pense_category">
            <text:p>expense_category</text:p>
          </table:table-cell>
          <table:table-cell table:style-name="pd1" office:value-type="string" office:string-value="item">
            <text:p>item</text:p>
          </table:table-cell>
          <table:table-cell table:style-name="pd1" office:value-type="string" office:string-value="value">
            <text:p>value</text:p>
          </table:table-cell>
          <table:table-cell table:style-name="pd1" office:value-type="string" office:string-value="store">
            <text:p>store</text:p>
          </table:table-cell>
          <table:table-cell table:style-name="pd1" office:value-type="string" office:string-value="city">
            <text:p>city</text:p>
          </table:table-cell>
          <table:table-cell table:style-name="pd1" office:value-type="string" office:string-value="category">
            <text:p>category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ESL Laktosefreie Milch 1,8%">
            <text:p>ESL Laktosefreie Milch 1,8%</text:p>
          </table:table-cell>
          <table:table-cell office:value-type="float" office:value="1.69">
            <text:p>1.6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Dairy Products">
            <text:p>Dairy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Pfannengemüse Asiatisch">
            <text:p>Pfannengemüse Asiatisch</text:p>
          </table:table-cell>
          <table:table-cell office:value-type="float" office:value="2.19">
            <text:p>2.1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Süßkartoffeln">
            <text:p>Süßkartoffeln</text:p>
          </table:table-cell>
          <table:table-cell office:value-type="float" office:value="2.9">
            <text:p>2.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Lachsfilet mit Haut (Flatskin)">
            <text:p>Lachsfilet mit Haut (Flatskin)</text:p>
          </table:table-cell>
          <table:table-cell office:value-type="float" office:value="6.99">
            <text:p>6.9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Fish and Seafood">
            <text:p>Fish and Seafood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Bananen">
            <text:p>Bananen</text:p>
          </table:table-cell>
          <table:table-cell office:value-type="float" office:value="1.04">
            <text:p>1.04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Gr. Joghurt Natur">
            <text:p>Gr. Joghurt Natur</text:p>
          </table:table-cell>
          <table:table-cell office:value-type="float" office:value="1.79">
            <text:p>1.7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Dairy Products">
            <text:p>Dairy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TK Kulturheidelbeeren">
            <text:p>TK Kulturheidelbeeren</text:p>
          </table:table-cell>
          <table:table-cell office:value-type="float" office:value="3.99">
            <text:p>3.9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TK Himbeeren">
            <text:p>TK Himbeeren</text:p>
          </table:table-cell>
          <table:table-cell office:value-type="float" office:value="3.99">
            <text:p>3.9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Cheddar gefärbt Scheiben">
            <text:p>Cheddar gefärbt Scheiben</text:p>
          </table:table-cell>
          <table:table-cell office:value-type="float" office:value="2.39">
            <text:p>2.3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Dairy Products">
            <text:p>Dairy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AMA Mageres Faschiert ge.60/40">
            <text:p>AMA Mageres Faschiert ge.60/40</text:p>
          </table:table-cell>
          <table:table-cell office:value-type="float" office:value="5.49">
            <text:p>5.49</text:p>
          </table:table-cell>
          <table:table-cell office:value-type="string" office:string-value="Lidl">
            <text:p>Lidl</text:p>
          </table:table-cell>
          <table:table-cell office:value-type="string" office:string-value="Villach">
            <text:p>Villach</text:p>
          </table:table-cell>
          <table:table-cell office:value-type="string" office:string-value="Meat and Meat Products">
            <text:p>Meat and Meat Products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S-BUDGET MINUTENSTEA">
            <text:p>S-BUDGET MINUTENSTEA</text:p>
          </table:table-cell>
          <table:table-cell office:value-type="float" office:value="3.27">
            <text:p>3.27</text:p>
          </table:table-cell>
          <table:table-cell office:value-type="string" office:string-value="SPAR">
            <text:p>SPAR</text:p>
          </table:table-cell>
          <table:table-cell office:value-type="string" office:string-value="Klagenfurt">
            <text:p>Klagenfurt</text:p>
          </table:table-cell>
          <table:table-cell office:value-type="string" office:string-value="Meat and Meat Products">
            <text:p>Meat and Meat Products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AMA HENDL-GESCHNETZE">
            <text:p>AMA HENDL-GESCHNETZE</text:p>
          </table:table-cell>
          <table:table-cell office:value-type="float" office:value="4.59">
            <text:p>4.59</text:p>
          </table:table-cell>
          <table:table-cell office:value-type="string" office:string-value="SPAR">
            <text:p>SPAR</text:p>
          </table:table-cell>
          <table:table-cell office:value-type="string" office:string-value="Klagenfurt">
            <text:p>Klagenfurt</text:p>
          </table:table-cell>
          <table:table-cell office:value-type="string" office:string-value="Meat and Meat Products">
            <text:p>Meat and Meat Products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BANANEN">
            <text:p>BANANEN</text:p>
          </table:table-cell>
          <table:table-cell office:value-type="float" office:value="2.0">
            <text:p>2.0</text:p>
          </table:table-cell>
          <table:table-cell office:value-type="string" office:string-value="SPAR">
            <text:p>SPAR</text:p>
          </table:table-cell>
          <table:table-cell office:value-type="string" office:string-value="Klagenfurt">
            <text:p>Klagenfurt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BIO DATTELN SN*P">
            <text:p>BIO DATTELN SN*P</text:p>
          </table:table-cell>
          <table:table-cell office:value-type="float" office:value="1.79">
            <text:p>1.79</text:p>
          </table:table-cell>
          <table:table-cell office:value-type="string" office:string-value="SPAR">
            <text:p>SPAR</text:p>
          </table:table-cell>
          <table:table-cell office:value-type="string" office:string-value="Klagenfurt">
            <text:p>Klagenfurt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TOM.SANMARZ BIO 300G">
            <text:p>TOM.SANMARZ BIO 300G</text:p>
          </table:table-cell>
          <table:table-cell office:value-type="float" office:value="2.99">
            <text:p>2.99</text:p>
          </table:table-cell>
          <table:table-cell office:value-type="string" office:string-value="SPAR">
            <text:p>SPAR</text:p>
          </table:table-cell>
          <table:table-cell office:value-type="string" office:string-value="Klagenfurt">
            <text:p>Klagenfurt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S-BUDGETCOTTAGECHEES">
            <text:p>S-BUDGETCOTTAGECHEES</text:p>
          </table:table-cell>
          <table:table-cell office:value-type="float" office:value="1.49">
            <text:p>1.49</text:p>
          </table:table-cell>
          <table:table-cell office:value-type="string" office:string-value="EUROSPAR">
            <text:p>EUROSPAR</text:p>
          </table:table-cell>
          <table:table-cell office:value-type="string" office:string-value="Klagenfurt">
            <text:p>Klagenfurt</text:p>
          </table:table-cell>
          <table:table-cell office:value-type="string" office:string-value="Dairy Products">
            <text:p>Dairy Products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S-BUDGETCOTTAGECHEES">
            <text:p>S-BUDGETCOTTAGECHEES</text:p>
          </table:table-cell>
          <table:table-cell office:value-type="float" office:value="1.49">
            <text:p>1.49</text:p>
          </table:table-cell>
          <table:table-cell office:value-type="string" office:string-value="EUROSPAR">
            <text:p>EUROSPAR</text:p>
          </table:table-cell>
          <table:table-cell office:value-type="string" office:string-value="Klagenfurt">
            <text:p>Klagenfurt</text:p>
          </table:table-cell>
          <table:table-cell office:value-type="string" office:string-value="Dairy Products">
            <text:p>Dairy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Heidelbeeren 300g">
            <text:p>Heidelbeeren 300g</text:p>
          </table:table-cell>
          <table:table-cell office:value-type="float" office:value="3.79">
            <text:p>3.7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Fruits and Vegetables">
            <text:p>Fruits and Vegetable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Strudelspez.">
            <text:p>Strudelspez.</text:p>
          </table:table-cell>
          <table:table-cell office:value-type="float" office:value="2.79">
            <text:p>2.7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Cereal and Bakery Products">
            <text:p>Cereal and Bakery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Strudelspez.">
            <text:p>Strudelspez.</text:p>
          </table:table-cell>
          <table:table-cell office:value-type="float" office:value="2.79">
            <text:p>2.7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Cereal and Bakery Products">
            <text:p>Cereal and Bakery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Speisestärke 400g">
            <text:p>Speisestärke 400g</text:p>
          </table:table-cell>
          <table:table-cell office:value-type="float" office:value="1.49">
            <text:p>1.4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Cereal and Bakery Products">
            <text:p>Cereal and Bakery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Bour Vanillezu 3er">
            <text:p>Bour Vanillezu 3er</text:p>
          </table:table-cell>
          <table:table-cell office:value-type="float" office:value="1.19">
            <text:p>1.1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Sugars and Confectionery">
            <text:p>Sugars and Confectionery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Gourmet-Schinken">
            <text:p>Gourmet-Schinken</text:p>
          </table:table-cell>
          <table:table-cell office:value-type="float" office:value="2.69">
            <text:p>2.6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Meat and Meat Products">
            <text:p>Meat and Meat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Eier FL 10er L">
            <text:p>Eier FL 10er L</text:p>
          </table:table-cell>
          <table:table-cell office:value-type="float" office:value="3.49">
            <text:p>3.4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Dairy Products">
            <text:p>Dairy Products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Pistazien geschält">
            <text:p>Pistazien geschält</text:p>
          </table:table-cell>
          <table:table-cell office:value-type="float" office:value="4.69">
            <text:p>4.6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Sugars and Confectionery">
            <text:p>Sugars and Confectionery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string" office:string-value="Food and Groceries">
            <text:p>Food and Groceries</text:p>
          </table:table-cell>
          <table:table-cell office:value-type="string" office:string-value="Jogh grie Art 600g">
            <text:p>Jogh grie Art 600g</text:p>
          </table:table-cell>
          <table:table-cell office:value-type="float" office:value="1.99">
            <text:p>1.99</text:p>
          </table:table-cell>
          <table:table-cell office:value-type="string" office:string-value="HOFER KG">
            <text:p>HOFER KG</text:p>
          </table:table-cell>
          <table:table-cell office:value-type="string" office:string-value="Klagenfurt">
            <text:p>Klagenfurt</text:p>
          </table:table-cell>
          <table:table-cell office:value-type="string" office:string-value="Dairy Products">
            <text:p>Dairy Product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